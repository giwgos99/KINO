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60000001C52A03032F.png" manifest:media-type="image/png"/>
  <manifest:file-entry manifest:full-path="Pictures/1000000000000449000000ED4A6B7098.png" manifest:media-type="image/png"/>
  <manifest:file-entry manifest:full-path="Pictures/1000000000000454000002E1C0DD64A4.png" manifest:media-type="image/png"/>
  <manifest:file-entry manifest:full-path="Pictures/100000000000032200000212E4B9987C.png" manifest:media-type="image/png"/>
  <manifest:file-entry manifest:full-path="Pictures/1000000000000449000002DAFCD740A0.png" manifest:media-type="image/png"/>
  <manifest:file-entry manifest:full-path="Pictures/100000000000044F000002DD2CD821B6.png" manifest:media-type="image/png"/>
  <manifest:file-entry manifest:full-path="Pictures/100000000000044A000002D460C9598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fo:language="el" fo:country="GR"/>
    </style:style>
    <style:style style:name="P2" style:family="paragraph" style:parent-style-name="Text_20_body">
      <style:paragraph-properties fo:margin-left="0in" fo:margin-right="0in" fo:text-align="start" style:justify-single-word="false" fo:text-indent="0in" style:auto-text-indent="false"/>
      <style:text-properties fo:language="el" fo:country="GR"/>
    </style:style>
    <style:style style:name="P3" style:family="paragraph" style:parent-style-name="Text_20_body" style:list-style-name="L1">
      <style:paragraph-properties fo:margin-left="0in" fo:margin-right="0in" fo:text-align="start" style:justify-single-word="false" fo:text-indent="0in" style:auto-text-indent="false"/>
    </style:style>
    <style:style style:name="P4" style:family="paragraph" style:parent-style-name="Text_20_body" style:list-style-name="L1">
      <style:paragraph-properties fo:margin-left="0in" fo:margin-right="0in" fo:text-align="start" style:justify-single-word="false" fo:text-indent="0in" style:auto-text-indent="false"/>
      <style:text-properties officeooo:paragraph-rsid="0000ac5f"/>
    </style:style>
    <style:style style:name="P5" style:family="paragraph" style:parent-style-name="Heading_20_4">
      <style:paragraph-properties fo:text-align="start" style:justify-single-word="false"/>
      <style:text-properties fo:language="el" fo:country="GR"/>
    </style:style>
    <style:style style:name="P6" style:family="paragraph" style:parent-style-name="Text_20_body" style:list-style-name="L2">
      <style:paragraph-properties fo:margin-left="0in" fo:margin-right="0in" fo:text-align="start" style:justify-single-word="false" fo:text-indent="0in" style:auto-text-indent="false"/>
      <style:text-properties officeooo:paragraph-rsid="0000ac5f"/>
    </style:style>
    <style:style style:name="P7" style:family="paragraph" style:parent-style-name="Text_20_body" style:list-style-name="L2">
      <style:paragraph-properties fo:margin-left="0in" fo:margin-right="0in" fo:text-align="start" style:justify-single-word="false" fo:text-indent="0in" style:auto-text-indent="false"/>
    </style:style>
    <style:style style:name="P8" style:family="paragraph" style:parent-style-name="Text_20_body" style:list-style-name="L2">
      <style:paragraph-properties fo:margin-left="0in" fo:margin-right="0in" fo:text-align="start" style:justify-single-word="false" fo:text-indent="0in" style:auto-text-indent="false"/>
      <style:text-properties fo:language="el" fo:country="GR"/>
    </style:style>
    <style:style style:name="P9" style:family="paragraph" style:parent-style-name="Text_20_body">
      <style:paragraph-properties fo:margin-left="0in" fo:margin-right="0in" fo:text-align="start" style:justify-single-word="false" fo:text-indent="0in" style:auto-text-indent="false"/>
      <style:text-properties fo:language="el" fo:country="GR" officeooo:paragraph-rsid="0000ee9e"/>
    </style:style>
    <style:style style:name="P10" style:family="paragraph" style:parent-style-name="Text_20_body" style:list-style-name="L3">
      <style:paragraph-properties fo:margin-left="0in" fo:margin-right="0in" fo:text-align="start" style:justify-single-word="false" fo:text-indent="0in" style:auto-text-indent="false"/>
    </style:style>
    <style:style style:name="P11" style:family="paragraph" style:parent-style-name="Text_20_body" style:list-style-name="L3">
      <style:paragraph-properties fo:margin-left="0in" fo:margin-right="0in" fo:text-align="start" style:justify-single-word="false" fo:text-indent="0in" style:auto-text-indent="false"/>
      <style:text-properties fo:language="el" fo:country="GR"/>
    </style:style>
    <style:style style:name="P12" style:family="paragraph" style:parent-style-name="Text_20_body">
      <style:paragraph-properties fo:margin-left="0in" fo:margin-right="0in" fo:text-align="start" style:justify-single-word="false" fo:text-indent="0in" style:auto-text-indent="false"/>
    </style:style>
    <style:style style:name="P13" style:family="paragraph" style:parent-style-name="Text_20_body" style:list-style-name="L4">
      <style:paragraph-properties fo:margin-left="0in" fo:margin-right="0in" fo:text-align="start" style:justify-single-word="false" fo:text-indent="0in" style:auto-text-indent="false"/>
    </style:style>
    <style:style style:name="P14" style:family="paragraph" style:parent-style-name="Text_20_body" style:list-style-name="L4">
      <style:paragraph-properties fo:margin-left="0in" fo:margin-right="0in" fo:text-align="start" style:justify-single-word="false" fo:text-indent="0in" style:auto-text-indent="false"/>
      <style:text-properties officeooo:paragraph-rsid="0000ee9e"/>
    </style:style>
    <style:style style:name="P15" style:family="paragraph" style:parent-style-name="Text_20_body" style:list-style-name="L4">
      <style:paragraph-properties fo:margin-left="0in" fo:margin-right="0in" fo:text-align="start" style:justify-single-word="false" fo:text-indent="0in" style:auto-text-indent="false"/>
      <style:text-properties fo:language="el" fo:country="GR" officeooo:paragraph-rsid="0000ee9e"/>
    </style:style>
    <style:style style:name="P16" style:family="paragraph" style:parent-style-name="Text_20_body">
      <style:paragraph-properties fo:margin-left="0in" fo:margin-right="0in" fo:text-align="start" style:justify-single-word="false" fo:text-indent="0in" style:auto-text-indent="false"/>
      <style:text-properties officeooo:paragraph-rsid="0000ee9e"/>
    </style:style>
    <style:style style:name="P17" style:family="paragraph" style:parent-style-name="Text_20_body" style:list-style-name="L5">
      <style:paragraph-properties fo:margin-left="0in" fo:margin-right="0in" fo:text-align="start" style:justify-single-word="false" fo:text-indent="0in" style:auto-text-indent="false"/>
    </style:style>
    <style:style style:name="P18" style:family="paragraph" style:parent-style-name="Text_20_body" style:list-style-name="L6">
      <style:paragraph-properties fo:margin-left="0in" fo:margin-right="0in" fo:text-align="start" style:justify-single-word="false" fo:text-indent="0in" style:auto-text-indent="false"/>
    </style:style>
    <style:style style:name="P19" style:family="paragraph" style:parent-style-name="Text_20_body" style:list-style-name="L7">
      <style:paragraph-properties fo:margin-left="0in" fo:margin-right="0in" fo:text-align="start" style:justify-single-word="false" fo:text-indent="0in" style:auto-text-indent="false"/>
      <style:text-properties fo:language="el" fo:country="GR"/>
    </style:style>
    <style:style style:name="P20" style:family="paragraph" style:parent-style-name="Text_20_body" style:list-style-name="L7">
      <style:paragraph-properties fo:margin-left="0in" fo:margin-right="0in" fo:text-align="start" style:justify-single-word="false" fo:text-indent="0in" style:auto-text-indent="false"/>
    </style:style>
    <style:style style:name="P21" style:family="paragraph" style:parent-style-name="Text_20_body" style:list-style-name="L8">
      <style:paragraph-properties fo:margin-left="0in" fo:margin-right="0in" fo:text-align="start" style:justify-single-word="false" fo:text-indent="0in" style:auto-text-indent="false"/>
    </style:style>
    <style:style style:name="P22" style:family="paragraph" style:parent-style-name="Text_20_body" style:list-style-name="L8">
      <style:paragraph-properties fo:margin-left="0in" fo:margin-right="0in" fo:text-align="start" style:justify-single-word="false" fo:text-indent="0in" style:auto-text-indent="false"/>
      <style:text-properties fo:language="el" fo:country="GR"/>
    </style:style>
    <style:style style:name="P23" style:family="paragraph" style:parent-style-name="Text_20_body" style:list-style-name="L9">
      <style:paragraph-properties fo:margin-left="0in" fo:margin-right="0in" fo:text-align="start" style:justify-single-word="false" fo:text-indent="0in" style:auto-text-indent="false"/>
    </style:style>
    <style:style style:name="P24" style:family="paragraph" style:parent-style-name="Text_20_body" style:list-style-name="L9">
      <style:paragraph-properties fo:margin-left="0in" fo:margin-right="0in" fo:text-align="start" style:justify-single-word="false" fo:text-indent="0in" style:auto-text-indent="false"/>
      <style:text-properties fo:language="el" fo:country="GR"/>
    </style:style>
    <style:style style:name="P25" style:family="paragraph" style:parent-style-name="Text_20_body" style:list-style-name="L10">
      <style:paragraph-properties fo:margin-left="0in" fo:margin-right="0in" fo:text-align="start" style:justify-single-word="false" fo:text-indent="0in" style:auto-text-indent="false"/>
    </style:style>
    <style:style style:name="P26" style:family="paragraph" style:parent-style-name="Text_20_body" style:list-style-name="L10">
      <style:paragraph-properties fo:margin-left="0in" fo:margin-right="0in" fo:text-align="start" style:justify-single-word="false" fo:text-indent="0in" style:auto-text-indent="false"/>
      <style:text-properties fo:language="el" fo:country="GR"/>
    </style:style>
    <style:style style:name="P27" style:family="paragraph" style:parent-style-name="Text_20_body" style:list-style-name="L11">
      <style:paragraph-properties fo:margin-left="0in" fo:margin-right="0in" fo:text-align="start" style:justify-single-word="false" fo:text-indent="0in" style:auto-text-indent="false"/>
    </style:style>
    <style:style style:name="P28" style:family="paragraph" style:parent-style-name="Text_20_body" style:list-style-name="L11">
      <style:paragraph-properties fo:margin-left="0in" fo:margin-right="0in" fo:text-align="start" style:justify-single-word="false" fo:text-indent="0in" style:auto-text-indent="false"/>
      <style:text-properties fo:language="el" fo:country="GR"/>
    </style:style>
    <style:style style:name="P29" style:family="paragraph" style:parent-style-name="Text_20_body" style:list-style-name="L12">
      <style:paragraph-properties fo:margin-left="0in" fo:margin-right="0in" fo:text-align="start" style:justify-single-word="false" fo:text-indent="0in" style:auto-text-indent="false"/>
    </style:style>
    <style:style style:name="P30" style:family="paragraph" style:parent-style-name="Text_20_body" style:list-style-name="L13">
      <style:paragraph-properties fo:margin-left="0in" fo:margin-right="0in" fo:text-align="start" style:justify-single-word="false" fo:text-indent="0in" style:auto-text-indent="false"/>
      <style:text-properties fo:language="el" fo:country="GR"/>
    </style:style>
    <style:style style:name="P31" style:family="paragraph" style:parent-style-name="Standard">
      <style:paragraph-properties fo:text-align="start" style:justify-single-word="false"/>
      <style:text-properties fo:language="el" fo:country="GR"/>
    </style:style>
    <style:style style:name="T1" style:family="text">
      <style:text-properties fo:language="el" fo:country="GR"/>
    </style:style>
    <style:style style:name="T2" style:family="text">
      <style:text-properties officeooo:rsid="0000ac5f"/>
    </style:style>
    <style:style style:name="T3" style:family="text">
      <style:text-properties fo:language="en" fo:country="U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Περιγραφή προγράμματος KINO</text:h>
      <text:p text:style-name="P2">Το πρόγραμμα «KINO» αποτελεί εφαρμογή προσομοίωσης παιχνιδιού τύπου λοταρίας (κίνο) σε περιβάλλον γραφικού χρήστη. Στόχος του είναι να επιτρέπει στον χρήστη να δημιουργεί δελτία με επιλεγμένους αριθμούς, να ορίζει παραμέτρους παιχνιδιού (ποσό κατάθεσης, ποσό πονταρίσματος, αριθμό κληρώσεων κ.λπ.) και να παρακολουθεί τα αποτελέσματα των κληρώσεων, τα κέρδη και βασικά στατιστικά στοιχεία.</text:p>
      <text:p text:style-name="P2"/>
      <text:h text:style-name="P1" text:outline-level="3">Σκοπός και λειτουργικός ρόλος</text:h>
      <text:list text:style-name="L1">
        <text:list-item>
          <text:p text:style-name="P3"><text:span text:style-name="Strong_20_Emphasis"><text:span text:style-name="T1">Σκοπός:</text:span></text:span><text:span text:style-name="T1"> Να προσομοιώσει τη λογική ενός πραγματικού παιχνιδιού KINO, προσφέροντας ένα ασφαλές περιβάλλον πειραματισμού με τυχαίες κληρώσεις, επιλογή αριθμών και υπολογισμό κερδών.</text:span></text:p>
        </text:list-item>
        <text:list-item>
          <text:p text:style-name="P3"><text:span text:style-name="Strong_20_Emphasis"><text:span text:style-name="T1">Κύριες λειτουργίες:</text:span></text:span></text:p>
          <text:list>
            <text:list-item>
              <text:p text:style-name="P3"><text:span text:style-name="Strong_20_Emphasis"><text:span text:style-name="T1">Αρχική κατάθεση και διαχείριση υπολοίπου</text:span></text:span><text:span text:style-name="T1"> (πορτοφόλι).</text:span></text:p>
            </text:list-item>
            <text:list-item>
              <text:p text:style-name="P3"><text:span text:style-name="Strong_20_Emphasis"><text:span text:style-name="T1">Δημιουργία και διαχείριση δελτίων</text:span></text:span><text:span text:style-name="T1"> με επιλεγμένους αριθμούς.</text:span></text:p>
            </text:list-item>
            <text:list-item>
              <text:p text:style-name="P3"><text:span text:style-name="Strong_20_Emphasis"><text:span text:style-name="T1">Ορισμός παραμέτρων κληρώσεων</text:span></text:span><text:span text:style-name="T1"> (πλήθος κληρώσεων, ποσό πονταρίσματος ανά κλήρωση).</text:span></text:p>
            </text:list-item>
            <text:list-item>
              <text:p text:style-name="P3"><text:span text:style-name="Strong_20_Emphasis"><text:span text:style-name="T1">Εκτέλεση κληρώσεων</text:span></text:span><text:span text:style-name="T1"> με τυχαία παραγωγή αριθμών.</text:span></text:p>
            </text:list-item>
            <text:list-item>
              <text:p text:style-name="P3"><text:span text:style-name="Strong_20_Emphasis"><text:span text:style-name="T1">Υπολογισμός επιτυχιών και κερδών</text:span></text:span><text:span text:style-name="T1"> ανά δελτίο.</text:span></text:p>
            </text:list-item>
            <text:list-item>
              <text:p text:style-name="P4"><text:span text:style-name="Strong_20_Emphasis"><text:span text:style-name="T1">Παρουσίαση στατιστικών</text:span></text:span><text:span text:style-name="T1"> (π.χ. λιγότερο εμφανιζόμενοι αριθμοί).</text:span></text:p>
            </text:list-item>
          </text:list>
        </text:list-item>
      </text:list>
      <text:h text:style-name="P1" text:outline-level="3"><text:soft-page-break/>Γραφικό περιβάλλον χρήστη (GUI)</text:h>
      <text:h text:style-name="P5" text:outline-level="4">Κεντρικό παράθυρο</text:h>
      <text:p text:style-name="P2">Το κεντρικό παράθυρο φέρει τον τίτλο «KINO» κ<text:span text:style-name="T2">αι</text:span> θυμίζει αισθητικά πραγματικές εφαρμογές τυχερών παιχνιδιών.<draw:frame draw:style-name="fr1" draw:name="Image1" text:anchor-type="char" svg:width="6.9252in" svg:height="4.6063in" draw:z-index="0"><draw:image xlink:href="Pictures/1000000000000454000002E1C0DD64A4.png" xlink:type="simple" xlink:show="embed" xlink:actuate="onLoad" draw:mime-type="image/png"/></draw:frame></text:p>
      <text:p text:style-name="P2">Στο επάνω τμήμα εμφανίζεται μια μπάρα παραμέτρων με:</text:p>
      <text:list text:style-name="L2">
        <text:list-item>
          <text:p text:style-name="P6"><text:span text:style-name="Strong_20_Emphasis"><text:span text:style-name="T1">Εικονίδιο πορτοφολιού</text:span></text:span><text:span text:style-name="T1"> και πεδίο υπολοίπου (π.χ. </text:span><text:span text:style-name="Source_20_Text"><text:span text:style-name="T1">500.00</text:span></text:span><text:span text:style-name="T1">, </text:span><text:span text:style-name="Source_20_Text"><text:span text:style-name="T1">501.00</text:span></text:span><text:span text:style-name="T1">, </text:span><text:span text:style-name="Source_20_Text"><text:span text:style-name="T1">499.00</text:span></text:span><text:span text:style-name="T1">), που αντιπροσωπεύει τα διαθέσιμα χρήματα του χρήστη.</text:span></text:p>
        </text:list-item>
        <text:list-item>
          <text:p text:style-name="P6"><text:span text:style-name="Strong_20_Emphasis"><text:span text:style-name="T1">Εικονίδιο κέρματος / πονταρίσματος</text:span></text:span><text:span text:style-name="T1"> με πεδίο ποσού ανά κλήρωση (π.χ. </text:span><text:span text:style-name="Source_20_Text"><text:span text:style-name="T1">1.00</text:span></text:span><text:span text:style-name="T1">).</text:span></text:p>
        </text:list-item>
        <text:list-item>
          <text:p text:style-name="P7"><text:span text:style-name="Strong_20_Emphasis"><text:span text:style-name="T1">Εικονίδιο κλεψύδρας</text:span></text:span><text:span text:style-name="T1"> με πεδίο αριθμού κληρώσεων που θα εκτελεστούν.</text:span></text:p>
        </text:list-item>
        <text:list-item>
          <text:p text:style-name="P7"><text:span text:style-name="Strong_20_Emphasis"><text:span text:style-name="T1">Εικονίδιο επανάληψης (κυκλικό βέλος)</text:span></text:span><text:span text:style-name="T1"> με πεδίο που μπορεί να χρησιμοποιηθεί για επιπλέον παραμέτρους (π.χ. αριθμός επαναλήψεων ή ταχύτητα).</text:span></text:p>
          <text:p text:style-name="P8"><draw:frame draw:style-name="fr2" draw:name="Image2" text:anchor-type="char" svg:width="6.6291in" svg:height="1.4319in" draw:z-index="1"><draw:image xlink:href="Pictures/1000000000000449000000ED4A6B7098.png" xlink:type="simple" xlink:show="embed" xlink:actuate="onLoad" draw:mime-type="image/png"/></draw:frame></text:p>
        </text:list-item>
      </text:list>
      <text:h text:style-name="P5" text:outline-level="4"><text:soft-page-break/>Πλέγμα αριθμών (1–80)</text:h>
      <text:p text:style-name="P9">Στο κεντρικό τμήμα της εφαρμογής υπάρχει πλέγμα 80 αριθμών (1 έως 80), οργανωμένο σε 8 σειρές και 10 στήλες. Σε ορισμένες οθόνες εμφανίζεται και ένδειξη τύπου: <text:span text:style-name="Strong_20_Emphasis">«Επόμενη κλήρωση σε: X»</text:span>, όπου X είναι αντίστροφη μέτρηση ή αριθμός κληρώσεων που απομένουν. Κάθε αριθμός εμφανίζεται ως κυκλικό κουμπί:</text:p>
      <text:list text:style-name="L3">
        <text:list-item>
          <text:p text:style-name="P10"><text:span text:style-name="Strong_20_Emphasis"><text:span text:style-name="T1">Μπλε κύκλοι:</text:span></text:span><text:span text:style-name="T1"> μη επιλεγμένοι αριθμοί.</text:span></text:p>
        </text:list-item>
        <text:list-item>
          <text:p text:style-name="P10"><text:span text:style-name="Strong_20_Emphasis"><text:span text:style-name="T1">Πορτοκαλί κύκλοι:</text:span></text:span><text:span text:style-name="T1"> αριθμοί που έχουν επιλεγεί είτε από τον χρήστη είτε έχουν κληρωθεί.</text:span></text:p>
          <text:p text:style-name="P11"><draw:frame draw:style-name="fr3" draw:name="Image3" text:anchor-type="char" svg:width="6.6291in" svg:height="4.411in" draw:z-index="2"><draw:image xlink:href="Pictures/1000000000000449000002DAFCD740A0.png" xlink:type="simple" xlink:show="embed" xlink:actuate="onLoad" draw:mime-type="image/png"/></draw:frame></text:p>
        </text:list-item>
      </text:list>
      <text:p text:style-name="P12"><text:soft-page-break/><text:span text:style-name="T1">Ο χρήστης μπορεί να επιλέγει αριθμούς κάνοντας κλικ πάνω στα αντίστοιχα κουμπιά. Σε ειδικό παράθυρο «Νέο Δελτίο» εμφανίζεται μήνυμα: </text:span><text:span text:style-name="Strong_20_Emphasis"><text:span text:style-name="T1">«Επιλέξτε έως 12 αριθμούς»</text:span></text:span><text:span text:style-name="T1">, και ο χρήστης μπορεί να </text:span><draw:frame draw:style-name="fr4" draw:name="Image5" text:anchor-type="char" svg:x="-0.3264in" svg:y="1.3571in" svg:width="6.6291in" svg:height="4.3807in" draw:z-index="4"><draw:image xlink:href="Pictures/100000000000032200000212E4B9987C.png" xlink:type="simple" xlink:show="embed" xlink:actuate="onLoad" draw:mime-type="image/png"/></draw:frame><text:span text:style-name="T1">επιλέξει μέχρι 12 αριθμούς για το δελτίο του.</text:span></text:p>
      <text:p text:style-name="P2"/>
      <text:h text:style-name="P5" text:outline-level="4"/>
      <text:h text:style-name="P5" text:outline-level="4"/>
      <text:h text:style-name="P5" text:outline-level="4"/>
      <text:h text:style-name="P5" text:outline-level="4"/>
      <text:h text:style-name="P5" text:outline-level="4"/>
      <text:h text:style-name="P5" text:outline-level="4">Κουμπιά ελέγχου</text:h>
      <text:p text:style-name="P2">Κάτω από το πλέγμα αριθμών υπάρχουν βασικά κουμπιά:</text:p>
      <text:list text:style-name="L4">
        <text:list-item>
          <text:p text:style-name="P13"><text:span text:style-name="Strong_20_Emphasis"><text:span text:style-name="T1">«ΤΥΧΑΙΑ ΕΠΙΛΟΓΗ»</text:span></text:span><text:span text:style-name="T1">: επιλέγει αυτόματα τυχαίους αριθμούς, σύμφωνα με τον μέγιστο επιτρεπόμενο αριθμό επιλογών (π.χ. 5 ή 12).</text:span></text:p>
        </text:list-item>
        <text:list-item>
          <text:p text:style-name="P14"><text:span text:style-name="Strong_20_Emphasis"><text:span text:style-name="T1">«</text:span></text:span><text:span text:style-name="Strong_20_Emphasis"><text:span text:style-name="T3">RESET</text:span></text:span><text:span text:style-name="Strong_20_Emphasis"><text:span text:style-name="T1">»</text:span></text:span><text:span text:style-name="T1">: επαναφέρει τις επιλογές αριθμών και τις παραμέτρους στην αρχική κατάσταςη.</text:span></text:p>
          <text:p text:style-name="P15"/>
          <text:p text:style-name="P14"><text:span text:style-name="Strong_20_Emphasis"><text:span text:style-name="T1"/></text:span></text:p>
        </text:list-item>
      </text:list>
      <text:p text:style-name="P16"><draw:frame draw:style-name="fr5" draw:name="Image6" text:anchor-type="char" svg:width="6.9252in" svg:height="4.5661in" draw:z-index="5"><draw:image xlink:href="Pictures/100000000000044A000002D460C9598E.png" xlink:type="simple" xlink:show="embed" xlink:actuate="onLoad" draw:mime-type="image/png"/></draw:frame><text:soft-page-break/><text:span text:style-name="Strong_20_Emphasis"><text:span text:style-name="T1"/></text:span></text:p>
      <text:list text:continue-numbering="true" text:style-name="L4">
        <text:list-header>
          <text:p text:style-name="P14"/>
          <text:p text:style-name="P14"><text:span text:style-name="Strong_20_Emphasis"><text:span text:style-name="T1"/></text:span></text:p>
          <text:p text:style-name="P14"/>
        </text:list-header>
        <text:list-item>
          <text:p text:style-name="P14"><text:span text:style-name="Strong_20_Emphasis"><text:span text:style-name="T1">ΕΝΑΡΞΗ ΚΛΗΡΩΣΕΩΝ»</text:span></text:span><text:span text:style-name="T1">: ξεκινά τη διαδικασία κληρώσεων με βάση τις τρέχουσες ρυθμίσεις. Όταν οι κληρώσεις ολοκληρωθούν, το κουμπί μπορεί να απενεργοποιείται ή να εμφανίζεται ένδειξη «ΟΛΟΚΛΗΡΩΘΗΚΕ!».</text:span></text:p>
        </text:list-item>
      </text:list>
      <text:h text:style-name="P5" text:outline-level="4"><draw:frame draw:style-name="fr4" draw:name="Image4" text:anchor-type="char" svg:x="-0.3354in" svg:y="0.1134in" svg:width="6.9252in" svg:height="4.6016in" draw:z-index="3"><draw:image xlink:href="Pictures/100000000000044F000002DD2CD821B6.png" xlink:type="simple" xlink:show="embed" xlink:actuate="onLoad" draw:mime-type="image/png"/></draw:frame><text:soft-page-break/></text:h>
      <text:h text:style-name="P5" text:outline-level="4"/>
      <text:h text:style-name="P5" text:outline-level="4">Διαχείριση δελτίων</text:h>
      <text:p text:style-name="P2">Στη δεξιά πλευρά υπάρχει πλαίσιο με τίτλο:</text:p>
      <text:list text:style-name="L5">
        <text:list-item>
          <text:p text:style-name="P17"><text:span text:style-name="Strong_20_Emphasis"><text:span text:style-name="T1">«ΤΑ ΔΕΛΤΙΑ ΜΟΥ»</text:span></text:span><text:span text:style-name="T1">: λίστα με όλα τα ενεργά δελτία του χρήστη.</text:span></text:p>
        </text:list-item>
        <text:list-item>
          <text:p text:style-name="P17"><text:span text:style-name="T1">Πλήκτρο </text:span><text:span text:style-name="Strong_20_Emphasis"><text:span text:style-name="T1">«Δημιουργία Δελτίου +»</text:span></text:span><text:span text:style-name="T1">: ανοίγει παράθυρο «Νέο Δελτίο» για επιλογή αριθμών.</text:span></text:p>
        </text:list-item>
      </text:list>
      <text:p text:style-name="P2">Κάθε δελτίο εμφανίζεται με μορφή:</text:p>
      <text:list text:style-name="L6">
        <text:list-item>
          <text:p text:style-name="P18"><text:span text:style-name="Strong_20_Emphasis"><text:span text:style-name="T1">«Δελτίο 1 (Κληρώσεις που απομένουν: 3): 1 - 17 - 37 - 39 - 65»</text:span></text:span></text:p>
        </text:list-item>
      </text:list>
      <text:p text:style-name="P2">Δηλαδή, αναγράφεται ο αριθμός του δελτίου, πόσες κληρώσεις απομένουν και οι επιλεγμένοι αριθμοί.</text:p>
      <text:p text:style-name="P2">Στο παράθυρο «Νέο Δελτίο» ο χρήστης:</text:p>
      <text:p text:style-name="P2"><draw:frame draw:style-name="fr4" draw:name="Image7" text:anchor-type="char" svg:x="3.2846in" svg:y="-0.139in" svg:width="3.6665in" svg:height="4.7189in" draw:z-index="6"><draw:image xlink:href="Pictures/1000000000000160000001C52A03032F.png" xlink:type="simple" xlink:show="embed" xlink:actuate="onLoad" draw:mime-type="image/png"/></draw:frame><text:soft-page-break/></text:p>
      <text:list text:style-name="L7">
        <text:list-item>
          <text:p text:style-name="P19">Επιλέγει έως 12 αριθμούς από το πλέγμα.</text:p>
        </text:list-item>
        <text:list-item>
          <text:p text:style-name="P19">Ορίζει τον αριθμό «Συνεχόμενες Κληρώσεις» (π.χ. 1, 3 κ.λπ.).</text:p>
        </text:list-item>
        <text:list-item>
          <text:p text:style-name="P20"><text:span text:style-name="T1">Επιβεβαιώνει με </text:span><text:span text:style-name="Strong_20_Emphasis"><text:span text:style-name="T1">«ΚΑΤΑΧΩΡΗΣΗ»</text:span></text:span><text:span text:style-name="T1"> ή ακυρώνει με </text:span><text:span text:style-name="Strong_20_Emphasis"><text:span text:style-name="T1">«ΑΚΥΡΟ»</text:span></text:span><text:span text:style-name="T1">.</text:span></text:p>
        </text:list-item>
      </text:list>
      <text:h text:style-name="P5" text:outline-level="4">Μηνύματα και διαλόγοι</text:h>
      <text:p text:style-name="P2">Κατά την εκκίνηση της εφαρμογής εμφανίζεται παράθυρο:</text:p>
      <text:list text:style-name="L8">
        <text:list-header>
          <text:p text:style-name="P21"><text:span text:style-name="Strong_20_Emphasis"><text:span text:style-name="T1"/></text:span></text:p>
          <text:p text:style-name="P21"><text:span text:style-name="Strong_20_Emphasis"><text:span text:style-name="T1"/></text:span></text:p>
          <text:p text:style-name="P21"><text:span text:style-name="Strong_20_Emphasis"><text:span text:style-name="T1"/></text:span></text:p>
          <text:p text:style-name="P21"><text:span text:style-name="Strong_20_Emphasis"><text:span text:style-name="T1"/></text:span></text:p>
          <text:p text:style-name="P21"><text:span text:style-name="Strong_20_Emphasis"><text:span text:style-name="T1"/></text:span></text:p>
          <text:p text:style-name="P21"><text:span text:style-name="Strong_20_Emphasis"><text:span text:style-name="T1"/></text:span></text:p>
        </text:list-header>
      </text:list>
      <text:p text:style-name="P12"><text:span text:style-name="Strong_20_Emphasis"><text:span text:style-name="T1"/></text:span></text:p>
      <text:list text:continue-numbering="true" text:style-name="L8">
        <text:list-header>
          <text:p text:style-name="P21"><text:span text:style-name="Strong_20_Emphasis"><text:span text:style-name="T1"/></text:span></text:p>
          <text:p text:style-name="P21"><text:span text:style-name="Strong_20_Emphasis"><text:span text:style-name="T1"/></text:span></text:p>
          <text:p text:style-name="P21"><text:span text:style-name="Strong_20_Emphasis"><text:span text:style-name="T1"/></text:span></text:p>
        </text:list-header>
        <text:list-item>
          <text:p text:style-name="P21"><text:span text:style-name="Strong_20_Emphasis"><text:span text:style-name="T1">«Αρχική Κατάθεση...»</text:span></text:span></text:p>
          <text:list>
            <text:list-item>
              <text:p text:style-name="P22">Μήνυμα: «Καλώς ήρθατε στο KINO! Παρακαλώ εισάγετε το ποσό κατάθεσης (€):»</text:p>
            </text:list-item>
            <text:list-item>
              <text:p text:style-name="P21"><text:span text:style-name="T1">Πεδίο εισαγωγής ποσού και κουμπιά </text:span><text:span text:style-name="Strong_20_Emphasis"><text:span text:style-name="T1">«OK»</text:span></text:span><text:span text:style-name="T1"> / </text:span><text:span text:style-name="Strong_20_Emphasis"><text:span text:style-name="T1">«Cancel»</text:span></text:span><text:span text:style-name="T1">.</text:span></text:p>
            </text:list-item>
          </text:list>
        </text:list-item>
      </text:list>
      <text:p text:style-name="P2">Μετά την ολοκλήρωση όλων των κληρώσεων εμφανίζεται παράθυρο:</text:p>
      <text:list text:style-name="L9">
        <text:list-item>
          <text:p text:style-name="P23"><text:span text:style-name="Strong_20_Emphasis"><text:span text:style-name="T1">«Ολοκλήρωση»</text:span></text:span></text:p>
          <text:list>
            <text:list-item>
              <text:p text:style-name="P24">Μήνυμα: «Όλες οι κληρώσεις ολοκληρώθηκαν!»</text:p>
            </text:list-item>
            <text:list-item>
              <text:p text:style-name="P23"><text:span text:style-name="T1">Κουμπί </text:span><text:span text:style-name="Strong_20_Emphasis"><text:span text:style-name="T1">«OK»</text:span></text:span><text:span text:style-name="T1">.</text:span></text:p>
            </text:list-item>
          </text:list>
        </text:list-item>
      </text:list>
      <text:h text:style-name="P1" text:outline-level="3"><text:soft-page-break/></text:h>
      <text:h text:style-name="P1" text:outline-level="3"/>
      <text:h text:style-name="P1" text:outline-level="3"/>
      <text:h text:style-name="P1" text:outline-level="3">Λογική λειτουργίας και ροή εκτέλεσης</text:h>
      <text:list text:style-name="L10">
        <text:list-item>
          <text:p text:style-name="P25"><text:span text:style-name="Strong_20_Emphasis"><text:span text:style-name="T1">Αρχική εκκίνηση:</text:span></text:span></text:p>
          <text:list>
            <text:list-item>
              <text:p text:style-name="P26">Ο χρήστης εκκινεί το πρόγραμμα.</text:p>
            </text:list-item>
            <text:list-item>
              <text:p text:style-name="P26">Εμφανίζεται παράθυρο «Αρχική Κατάθεση» και ο χρήστης εισάγει το αρχικό ποσό.</text:p>
            </text:list-item>
            <text:list-item>
              <text:p text:style-name="P26">Το ποσό αποθηκεύεται ως υπόλοιπο πορτοφολιού.</text:p>
            </text:list-item>
          </text:list>
        </text:list-item>
        <text:list-item>
          <text:p text:style-name="P25"><text:span text:style-name="Strong_20_Emphasis"><text:span text:style-name="T1">Ορισμός παραμέτρων παιχνιδιού:</text:span></text:span></text:p>
          <text:list>
            <text:list-item>
              <text:p text:style-name="P26">Ο χρήστης ορίζει το ποσό πονταρίσματος ανά κλήρωση.</text:p>
            </text:list-item>
            <text:list-item>
              <text:p text:style-name="P26">Ορίζει τον αριθμό κληρώσεων που θα εκτελεστούν.</text:p>
            </text:list-item>
            <text:list-item>
              <text:p text:style-name="P26">Προαιρετικά, ορίζει επιπλέον παραμέτρους (π.χ. επαναλήψεις).</text:p>
            </text:list-item>
          </text:list>
        </text:list-item>
        <text:list-item>
          <text:p text:style-name="P25"><text:span text:style-name="Strong_20_Emphasis"><text:span text:style-name="T1">Δημιουργία δελτίου:</text:span></text:span></text:p>
          <text:list>
            <text:list-item>
              <text:p text:style-name="P26">Μέσω «Δημιουργία Δελτίου +» ανοίγει το παράθυρο «Νέο Δελτίο».</text:p>
            </text:list-item>
            <text:list-item>
              <text:p text:style-name="P26">Ο χρήστης επιλέγει έως 12 αριθμούς από το πλέγμα 1–80.</text:p>
            </text:list-item>
            <text:list-item>
              <text:p text:style-name="P26">Ορίζει πόσες συνεχόμενες κληρώσεις θα συμμετέχει το δελτίο.</text:p>
            </text:list-item>
            <text:list-item>
              <text:p text:style-name="P26">Πατά «ΚΑΤΑΧΩΡΗΣΗ» και το δελτίο προστίθεται στη λίστα «ΤΑ ΔΕΛΤΙΑ ΜΟΥ».</text:p>
            </text:list-item>
          </text:list>
        </text:list-item>
        <text:list-item>
          <text:p text:style-name="P25"><text:span text:style-name="Strong_20_Emphasis"><text:span text:style-name="T1">Έναρξη κληρώσεων:</text:span></text:span></text:p>
          <text:list>
            <text:list-item>
              <text:p text:style-name="P26">Με το κουμπί «ΕΝΑΡΞΗ ΚΛΗΡΩΣΕΩΝ» ξεκινά η διαδικασία.</text:p>
            </text:list-item>
            <text:list-item>
              <text:p text:style-name="P26">Για κάθε κλήρωση παράγεται τυχαίο σύνολο αριθμών (π.χ. 20 αριθμοί από 1–80).</text:p>
            </text:list-item>
            <text:list-item>
              <text:p text:style-name="P26">Οι κληρωθέντες αριθμοί εμφανίζονται ως πορτοκαλί κύκλοι στο πλέγμα.</text:p>
            </text:list-item>
          </text:list>
        </text:list-item>
        <text:list-item>
          <text:p text:style-name="P25"><text:span text:style-name="Strong_20_Emphasis"><text:span text:style-name="T1">Υπολογισμός αποτελεσμάτων:</text:span></text:span></text:p>
          <text:list>
            <text:list-item>
              <text:p text:style-name="P26">Για κάθε δελτίο υπολογίζεται πόσοι από τους επιλεγμένους αριθμούς συμπίπτουν με τους κληρωθέντες.</text:p>
            </text:list-item>
            <text:list-item>
              <text:p text:style-name="P26">Ανάλογα με τον αριθμό επιτυχιών (π.χ. 3/5) υπολογίζεται το κέρδος.</text:p>
            </text:list-item>
            <text:list-item>
              <text:p text:style-name="P26">Το κέρδος προστίθεται στο πορτοφόλι και ενημερώνεται το υπόλοιπο.</text:p>
            </text:list-item>
          </text:list>
        </text:list-item>
        <text:list-item>
          <text:p text:style-name="P25"><text:span text:style-name="Strong_20_Emphasis"><text:span text:style-name="T1">Εμφάνιση αποτελεσμάτων:</text:span></text:span></text:p>
          <text:list>
            <text:list-item>
              <text:p text:style-name="P26">Στο κάτω μέρος εμφανίζονται μηνύματα τύπου:</text:p>
              <text:list>
                <text:list-item>
                  <text:p text:style-name="P26">«Δελτίο 1: 3/5 επιτυχίες! ΚΕΡΔΟΣ: 2.00€»</text:p>
                </text:list-item>
                <text:list-item>
                  <text:p text:style-name="P26"><text:soft-page-break/>«Δελτίο 1: 0/5 επιτυχίες. (Χωρίς Κέρδος)»</text:p>
                </text:list-item>
              </text:list>
            </text:list-item>
            <text:list-item>
              <text:p text:style-name="P26">Τα αποτελέσματα καταγράφονται διαδοχικά, ώστε ο χρήστης να βλέπει ιστορικό κληρώσεων.</text:p>
            </text:list-item>
          </text:list>
        </text:list-item>
        <text:list-item>
          <text:p text:style-name="P25"><text:span text:style-name="Strong_20_Emphasis"><text:span text:style-name="T1">Ολοκλήρωση:</text:span></text:span></text:p>
          <text:list>
            <text:list-item>
              <text:p text:style-name="P26">Όταν ολοκληρωθούν όλες οι προγραμματισμένες κληρώσεις, εμφανίζεται μήνυμα «Όλες οι κληρώσεις ολοκληρώθηκαν!» και η εφαρμογή επιστρέφει σε κατάσταση αναμονής για νέα δελτία ή νέα σειρά κληρώσεων.</text:p>
            </text:list-item>
          </text:list>
        </text:list-item>
      </text:list>
      <text:h text:style-name="P1" text:outline-level="3">Στατιστικά και ανάλυση αριθμών</text:h>
      <text:p text:style-name="P2">Στο κάτω δεξί τμήμα της εφαρμογής υπάρχει ενότητα:</text:p>
      <text:list text:style-name="L11">
        <text:list-item>
          <text:p text:style-name="P27"><text:span text:style-name="Strong_20_Emphasis"><text:span text:style-name="T1">«--- 20 ΛΙΓΟΤΕΡΟ ΕΠΙΛΕΓΜΕΝΟΙ ΑΡΙΘΜΟΙ ---»</text:span></text:span></text:p>
        </text:list-item>
        <text:list-item>
          <text:p text:style-name="P28">Πίνακας με στήλες:</text:p>
          <text:list>
            <text:list-item>
              <text:p text:style-name="P27"><text:span text:style-name="Strong_20_Emphasis"><text:span text:style-name="T1">«ΝΟΥΜΕΡΟ»</text:span></text:span></text:p>
            </text:list-item>
            <text:list-item>
              <text:p text:style-name="P27"><text:span text:style-name="Strong_20_Emphasis"><text:span text:style-name="T1">«ΑΠΟΥΣΙΑΖΕΙ (ΚΛΗΡΩΣΕΙΣ)»</text:span></text:span></text:p>
            </text:list-item>
          </text:list>
        </text:list-item>
      </text:list>
      <text:p text:style-name="P12"><text:span text:style-name="T1">Εδώ εμφανίζονται αριθμοί (π.χ. </text:span><text:span text:style-name="Source_20_Text"><text:span text:style-name="T1">No 03</text:span></text:span><text:span text:style-name="T1">, </text:span><text:span text:style-name="Source_20_Text"><text:span text:style-name="T1">No 18</text:span></text:span><text:span text:style-name="T1">, </text:span><text:span text:style-name="Source_20_Text"><text:span text:style-name="T1">No 28</text:span></text:span><text:span text:style-name="T1"> κ.λπ.) μαζί με τον αριθμό κληρώσεων στις οποίες δεν εμφανίστηκαν. Αυτό επιτρέπει:</text:span></text:p>
      <text:list text:style-name="L12">
        <text:list-item>
          <text:p text:style-name="P29"><text:span text:style-name="Strong_20_Emphasis"><text:span text:style-name="T1">Παρακολούθηση συχνότητας εμφάνισης αριθμών.</text:span></text:span></text:p>
        </text:list-item>
        <text:list-item>
          <text:p text:style-name="P29"><text:span text:style-name="Strong_20_Emphasis"><text:span text:style-name="T1">Ενδεικτική στατιστική ανάλυση</text:span></text:span><text:span text:style-name="T1"> για το πόσο «σπάνιοι» είναι κάποιοι αριθμοί μέσα στο πλαίσιο της προσομοίωσης.</text:span></text:p>
        </text:list-item>
      </text:list>
      <text:h text:style-name="P1" text:outline-level="3"/>
      <text:h text:style-name="P1" text:outline-level="3">Συμπέρασμα</text:h>
      <text:p text:style-name="P2">Το πρόγραμμα «KINO» λειτουργεί ως <text:s/>προσομοίωση παιχνιδιού λοταρίας.</text:p>
      <text:list text:style-name="L13">
        <text:list-item>
          <text:p text:style-name="P30">Διαδραστική επιλογή αριθμών μέσω γραφικού περιβάλλοντος.</text:p>
        </text:list-item>
        <text:list-item>
          <text:p text:style-name="P30">Τυχαία παραγωγή κληρώσεων.</text:p>
        </text:list-item>
        <text:list-item>
          <text:p text:style-name="P30">Υπολογισμό κερδών και διαχείριση υπολοίπου.</text:p>
        </text:list-item>
        <text:list-item>
          <text:p text:style-name="P30">Βασική στατιστική ανάλυση συχνότητας αριθμών.</text:p>
        </text:list-item>
      </text:list>
      <text:p text:style-name="P2"/>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8T23:46:51.089404900</meta:creation-date>
    <dc:date>2026-06-09T00:10:52.528841900</dc:date>
    <meta:editing-duration>PT2M39S</meta:editing-duration>
    <meta:editing-cycles>1</meta:editing-cycles>
    <meta:document-statistic meta:table-count="0" meta:image-count="7" meta:object-count="0" meta:page-count="9" meta:paragraph-count="109" meta:word-count="906" meta:character-count="5994" meta:non-whitespace-character-count="5267"/>
    <meta:generator>LibreOffice/25.8.5.2$Windows_X86_64 LibreOffice_project/9c8b85f387cc00a89945a79c9e6239f32e450ac2</meta:generator>
  </office:meta>
</office:document-meta>
</file>